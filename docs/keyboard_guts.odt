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F000000C00207F1D4B7E67207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0000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77bc65" draw:fill-color="#000000" draw:textarea-horizontal-align="justify" draw:textarea-vertical-align="middle" draw:auto-grow-height="false" fo:min-height="0.2374in" fo:min-width="0.0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custom-shape text:anchor-type="paragraph" draw:z-index="1" draw:name="Shape 2" draw:style-name="gr1" draw:text-style-name="P1" svg:width="0.1717in" svg:height="0.2858in" draw:transform="rotate (0.120427718387609) translate (4.88333333333333in 2.98541666666667in)"><text:p/><draw:enhanced-geometry svg:viewBox="0 0 21600 21600" draw:text-areas="?f0 ?f7 ?f2 21600" draw:type="up-arrow" draw:modifiers="9490.36544850498 6623.05805396566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 3" draw:style-name="gr1" draw:text-style-name="P1" svg:width="0.1717in" svg:height="0.2858in" draw:transform="rotate (0.120427718387609) translate (5.80138888888889in 2.95833333333333in)"><text:p/><draw:enhanced-geometry svg:viewBox="0 0 21600 21600" draw:text-areas="?f0 ?f7 ?f2 21600" draw:type="up-arrow" draw:modifiers="9490.36544850498 6623.05805396566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" draw:name="Image1" text:anchor-type="char" svg:width="6.9252in" svg:height="5.2138in" draw:z-index="0"><draw:image xlink:href="Pictures/1000000000000FF000000C00207F1D4B7E67207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21:36:27.335317337</meta:creation-date>
    <dc:date>2024-02-01T22:05:40.437505525</dc:date>
    <meta:editing-duration>PT21M18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